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IT Rachana" svg:font-family="'RIT Rachana'"/>
  </office:font-face-decls>
  <office:automatic-styles>
    <style:style style:name="P1" style:family="paragraph" style:parent-style-name="Heading_20_3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style:text-blinking="false" fo:background-color="transparent"/>
    </style:style>
    <style:style style:name="P2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officeooo:rsid="00150e0b" officeooo:paragraph-rsid="00150e0b" style:text-blinking="false" fo:background-color="transparent" style:font-weight-asian="bold" style:font-weight-complex="bold"/>
    </style:style>
    <style:style style:name="P3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style:text-blinking="false" fo:background-color="transparent"/>
    </style:style>
    <style:style style:name="P4" style:family="paragraph" style:parent-style-name="Heading_20_3">
      <style:paragraph-properties fo:text-align="center" style:justify-single-word="false"/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solid" style:text-underline-width="auto" style:text-underline-color="font-color" fo:font-weight="bold" style:text-blinking="false" fo:background-color="transparent"/>
    </style:style>
    <style:style style:name="P5" style:family="paragraph" style:parent-style-name="Standard">
      <style:text-properties officeooo:paragraph-rsid="00131f7a"/>
    </style:style>
    <style:style style:name="P6" style:family="paragraph" style:parent-style-name="Standard">
      <style:text-properties fo:font-weight="bold" officeooo:rsid="00150e0b" officeooo:paragraph-rsid="00150e0b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officeooo:paragraph-rsid="001bde8a"/>
    </style:style>
    <style:style style:name="P8" style:family="paragraph" style:parent-style-name="Standard">
      <style:text-properties fo:font-size="11pt" fo:font-weight="bold" officeooo:rsid="00150e0b" officeooo:paragraph-rsid="00150e0b" style:font-size-asian="11pt" style:font-weight-asian="bold" style:font-size-complex="11pt" style:font-weight-complex="bold"/>
    </style:style>
    <style:style style:name="P9" style:family="paragraph" style:parent-style-name="Heading_20_3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style:text-blinking="false" fo:background-color="transparent"/>
    </style:style>
    <style:style style:name="P10" style:family="paragraph" style:parent-style-name="Heading_20_3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officeooo:paragraph-rsid="00131f7a" style:text-blinking="false" fo:background-color="transparent"/>
    </style:style>
    <style:style style:name="P11" style:family="paragraph" style:parent-style-name="Heading_20_3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solid" style:text-underline-width="auto" style:text-underline-color="font-color" fo:font-weight="bold" officeooo:rsid="001766c4" officeooo:paragraph-rsid="001766c4" style:text-blinking="false" fo:background-color="transparent" style:font-size-asian="11pt" style:font-weight-asian="bold" style:font-size-complex="11pt" style:font-weight-complex="bold"/>
    </style:style>
    <style:style style:name="P12" style:family="paragraph" style:parent-style-name="Heading_20_3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solid" style:text-underline-width="auto" style:text-underline-color="font-color" fo:font-weight="bold" officeooo:rsid="0019544f" officeooo:paragraph-rsid="001a92a1" style:text-blinking="false" fo:background-color="transparent" style:font-size-asian="12pt" style:font-weight-asian="bold" style:font-size-complex="12pt" style:font-weight-complex="bold"/>
    </style:style>
    <style:style style:name="P13" style:family="paragraph" style:parent-style-name="Heading_20_3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solid" style:text-underline-width="auto" style:text-underline-color="font-color" fo:font-weight="bold" officeooo:rsid="00150e0b" officeooo:paragraph-rsid="00153026" style:text-blinking="false" fo:background-color="transparent" style:font-size-asian="12pt" style:font-weight-asian="bold" style:font-size-complex="12pt" style:font-weight-complex="bold"/>
    </style:style>
    <style:style style:name="P14" style:family="paragraph" style:parent-style-name="Standard" style:list-style-name="L1"/>
    <style:style style:name="P15" style:family="paragraph" style:parent-style-name="Standard" style:list-style-name="L1">
      <style:text-properties officeooo:paragraph-rsid="00131f7a"/>
    </style:style>
    <style:style style:name="P16" style:family="paragraph" style:parent-style-name="Standard" style:list-style-name="L2"/>
    <style:style style:name="P17" style:family="paragraph" style:parent-style-name="Standard" style:list-style-name="L3">
      <style:text-properties officeooo:paragraph-rsid="00131f7a"/>
    </style:style>
    <style:style style:name="P18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style:text-blinking="false" fo:background-color="transparent"/>
    </style:style>
    <style:style style:name="P19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Arial" fo:font-size="14pt" fo:font-style="normal" style:text-underline-style="solid" style:text-underline-width="auto" style:text-underline-color="font-color" fo:font-weight="bold" officeooo:rsid="00150e0b" officeooo:paragraph-rsid="00153026" fo:background-color="transparent" style:font-weight-asian="bold" style:font-weight-complex="bold"/>
    </style:style>
    <style:style style:name="P20" style:family="paragraph" style:parent-style-name="Standard" style:list-style-name="L6">
      <style:paragraph-properties fo:text-align="start" style:justify-single-word="false"/>
      <style:text-properties fo:font-variant="normal" fo:text-transform="none" fo:color="#000000" loext:opacity="100%" style:font-name="Arial" fo:font-size="11pt" fo:font-style="normal" style:text-underline-style="none" fo:font-weight="normal" officeooo:rsid="0015b125" officeooo:paragraph-rsid="00153026" fo:background-color="transparent" style:font-size-asian="11pt" style:font-weight-asian="normal" style:font-size-complex="11pt" style:font-weight-complex="normal"/>
    </style:style>
    <style:style style:name="P21" style:family="paragraph" style:parent-style-name="Standard" style:list-style-name="L6">
      <style:paragraph-properties fo:text-align="start" style:justify-single-word="false"/>
      <style:text-properties fo:font-variant="normal" fo:text-transform="none" fo:color="#000000" loext:opacity="100%" style:font-name="Arial" fo:font-size="11pt" fo:font-style="normal" style:text-underline-style="none" fo:font-weight="normal" officeooo:rsid="0015b125" officeooo:paragraph-rsid="0015b125" fo:background-color="transparent" style:font-size-asian="11pt" style:font-weight-asian="normal" style:font-size-complex="11pt" style:font-weight-complex="normal"/>
    </style:style>
    <style:style style:name="P22" style:family="paragraph" style:parent-style-name="Standard" style:list-style-name="L6">
      <style:paragraph-properties fo:text-align="start" style:justify-single-word="false"/>
      <style:text-properties fo:font-variant="normal" fo:text-transform="none" fo:color="#000000" loext:opacity="100%" style:font-name="Arial" fo:font-size="11pt" fo:font-style="normal" style:text-underline-style="none" fo:font-weight="normal" officeooo:rsid="0015b125" officeooo:paragraph-rsid="00173339" fo:background-color="transparent" style:font-size-asian="11pt" style:font-weight-asian="normal" style:font-size-complex="11pt" style:font-weight-complex="normal"/>
    </style:style>
    <style:style style:name="P23" style:family="paragraph" style:parent-style-name="Standard" style:list-style-name="L6">
      <style:paragraph-properties fo:text-align="start" style:justify-single-word="false"/>
      <style:text-properties fo:font-variant="normal" fo:text-transform="none" fo:color="#000000" loext:opacity="100%" style:font-name="Arial" fo:font-size="11pt" fo:font-style="normal" style:text-underline-style="none" fo:font-weight="normal" officeooo:rsid="001766c4" officeooo:paragraph-rsid="001766c4" fo:background-color="transparent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Arial" fo:font-size="11pt" fo:font-style="normal" style:text-underline-style="none" fo:font-weight="normal" officeooo:rsid="001766c4" officeooo:paragraph-rsid="001766c4" fo:background-color="transparent" style:font-size-asian="11pt" style:font-weight-asian="normal" style:font-size-complex="11pt" style:font-weight-complex="normal"/>
    </style:style>
    <style:style style:name="P25" style:family="paragraph" style:parent-style-name="Standard" style:list-style-name="L7">
      <style:paragraph-properties fo:text-align="start" style:justify-single-word="false"/>
      <style:text-properties fo:font-variant="normal" fo:text-transform="none" fo:color="#000000" loext:opacity="100%" style:font-name="Arial" fo:font-size="11pt" fo:font-style="normal" style:text-underline-style="none" fo:font-weight="normal" officeooo:rsid="0019544f" officeooo:paragraph-rsid="001a92a1" fo:background-color="transparent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Arial" fo:font-size="11pt" fo:font-style="normal" style:text-underline-style="none" fo:font-weight="normal" officeooo:rsid="0019544f" officeooo:paragraph-rsid="001a92a1" fo:background-color="transparent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Arial" fo:font-size="11pt" fo:font-style="normal" style:text-underline-style="none" fo:font-weight="normal" officeooo:rsid="0019544f" officeooo:paragraph-rsid="001bde8a" fo:background-color="transparent" style:font-size-asian="11pt" style:font-weight-asian="normal" style:font-size-complex="11pt" style:font-weight-complex="normal"/>
    </style:style>
    <style:style style:name="P28" style:family="paragraph" style:parent-style-name="Standard" style:list-style-name="L9">
      <style:paragraph-properties fo:text-align="start" style:justify-single-word="false"/>
      <style:text-properties fo:font-variant="normal" fo:text-transform="none" fo:color="#000000" loext:opacity="100%" style:font-name="Arial" fo:font-size="11pt" fo:font-style="normal" style:text-underline-style="none" fo:font-weight="normal" officeooo:rsid="001bde8a" officeooo:paragraph-rsid="001bde8a" fo:background-color="transparent" style:font-size-asian="11pt" style:font-weight-asian="normal" style:font-size-complex="11pt" style:font-weight-complex="normal"/>
    </style:style>
    <style:style style:name="P29" style:family="paragraph" style:parent-style-name="Standard" style:list-style-name="L4">
      <style:text-properties fo:font-weight="bold" officeooo:rsid="00131f7a" officeooo:paragraph-rsid="00131f7a" style:font-weight-asian="bold" style:font-weight-complex="bold"/>
    </style:style>
    <style:style style:name="P30" style:family="paragraph" style:parent-style-name="Standard" style:list-style-name="L4">
      <style:text-properties fo:font-weight="normal" officeooo:rsid="00150e0b" officeooo:paragraph-rsid="00150e0b" style:font-weight-asian="normal" style:font-weight-complex="normal"/>
    </style:style>
    <style:style style:name="P31" style:family="paragraph" style:parent-style-name="Standard">
      <style:text-properties fo:font-weight="normal" officeooo:rsid="00150e0b" officeooo:paragraph-rsid="00150e0b" style:font-weight-asian="normal" style:font-weight-complex="normal"/>
    </style:style>
    <style:style style:name="P32" style:family="paragraph" style:parent-style-name="Standard" style:list-style-name="L5">
      <style:text-properties officeooo:paragraph-rsid="00150e0b"/>
    </style:style>
    <style:style style:name="P33" style:family="paragraph" style:parent-style-name="Standard" style:list-style-name="L6">
      <style:paragraph-properties fo:text-align="start" style:justify-single-word="false"/>
      <style:text-properties fo:font-size="11pt" officeooo:paragraph-rsid="001e8101" style:font-size-asian="11pt" style:font-size-complex="11pt"/>
    </style:style>
    <style:style style:name="P34" style:family="paragraph" style:parent-style-name="Standard" style:list-style-name="L7">
      <style:paragraph-properties fo:text-align="start" style:justify-single-word="false"/>
      <style:text-properties officeooo:paragraph-rsid="001a92a1"/>
    </style:style>
    <style:style style:name="P35" style:family="paragraph" style:parent-style-name="Standard" style:list-style-name="L8">
      <style:paragraph-properties fo:text-align="start" style:justify-single-word="false"/>
      <style:text-properties officeooo:paragraph-rsid="001a92a1"/>
    </style:style>
    <style:style style:name="P36" style:family="paragraph" style:parent-style-name="Standard" style:list-style-name="L9">
      <style:paragraph-properties fo:text-align="start" style:justify-single-word="false"/>
      <style:text-properties officeooo:paragraph-rsid="001bde8a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50e0b" style:text-blinking="false" fo:background-color="transparent" loext:char-shading-value="0" style:font-weight-asian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font-size="11pt" fo:letter-spacing="normal" fo:font-style="normal" style:text-underline-style="none" fo:font-weight="normal" officeooo:rsid="00150e0b" style:text-blinking="false" fo:background-color="transparent" loext:char-shading-value="0" style:font-weight-asian="normal" style:font-weight-complex="normal"/>
    </style:style>
    <style:style style:name="T4" style:family="text">
      <style:text-properties fo:font-variant="normal" fo:text-transform="none" fo:color="#000000" loext:opacity="100%" style:font-name="Arial" fo:font-style="normal" style:text-underline-style="none" fo:font-weight="normal" officeooo:rsid="0015b125" fo:background-color="transparent" loext:char-shading-value="0" style:font-weight-asian="normal" style:font-weight-complex="normal"/>
    </style:style>
    <style:style style:name="T5" style:family="text">
      <style:text-properties fo:font-variant="normal" fo:text-transform="none" fo:color="#000000" loext:opacity="100%" style:font-name="Arial" fo:font-style="normal" style:text-underline-style="none" fo:font-weight="normal" officeooo:rsid="001766c4" fo:background-color="transparent" loext:char-shading-value="0" style:font-weight-asian="normal" style:font-weight-complex="normal"/>
    </style:style>
    <style:style style:name="T6" style:family="text">
      <style:text-properties fo:font-variant="normal" fo:text-transform="none" fo:color="#000000" loext:opacity="100%" style:font-name="Arial" fo:font-style="normal" style:text-underline-style="none" fo:font-weight="bold" officeooo:rsid="001766c4" fo:background-color="transparent" loext:char-shading-value="0" style:font-weight-asian="bold" style:font-weight-complex="bold"/>
    </style:style>
    <style:style style:name="T7" style:family="text">
      <style:text-properties fo:font-variant="normal" fo:text-transform="none" fo:color="#000000" loext:opacity="100%" style:font-name="Arial" fo:font-size="11pt" fo:font-style="normal" style:text-underline-style="none" fo:font-weight="normal" officeooo:rsid="00150e0b" fo:background-color="transparent" loext:char-shading-value="0" style:font-size-asian="11pt" style:font-weight-asian="normal" style:font-size-complex="11pt" style:font-weight-complex="normal"/>
    </style:style>
    <style:style style:name="T8" style:family="text">
      <style:text-properties fo:font-variant="normal" fo:text-transform="none" fo:color="#000000" loext:opacity="100%" style:font-name="Arial" fo:font-size="11pt" fo:font-style="normal" style:text-underline-style="none" fo:font-weight="normal" officeooo:rsid="0019544f" fo:background-color="transparent" loext:char-shading-value="0" style:font-size-asian="11pt" style:font-weight-asian="normal" style:font-size-complex="11pt" style:font-weight-complex="normal"/>
    </style:style>
    <style:style style:name="T9" style:family="text">
      <style:text-properties fo:font-variant="normal" fo:text-transform="none" fo:color="#000000" loext:opacity="100%" style:font-name="Arial" fo:font-size="11pt" fo:font-style="normal" style:text-underline-style="none" fo:font-weight="normal" officeooo:rsid="001a92a1" fo:background-color="transparent" loext:char-shading-value="0" style:font-size-asian="11pt" style:font-weight-asian="normal" style:font-size-complex="11pt" style:font-weight-complex="normal"/>
    </style:style>
    <style:style style:name="T10" style:family="text">
      <style:text-properties fo:font-variant="normal" fo:text-transform="none" fo:color="#000000" loext:opacity="100%" style:font-name="Arial" fo:font-size="11pt" fo:font-style="normal" style:text-underline-style="none" fo:font-weight="normal" officeooo:rsid="001bde8a" fo:background-color="transparent" loext:char-shading-value="0" style:font-size-asian="11pt" style:font-weight-asian="normal" style:font-size-complex="11pt" style:font-weight-complex="normal"/>
    </style:style>
    <style:style style:name="T11" style:family="text">
      <style:text-properties fo:font-variant="normal" fo:text-transform="none" fo:color="#000000" loext:opacity="100%" style:font-name="Arial" fo:font-size="11pt" fo:font-style="normal" style:text-underline-style="none" fo:font-weight="normal" officeooo:rsid="001d07d0" fo:background-color="transparent" loext:char-shading-value="0" style:font-size-asian="11pt" style:font-weight-asian="normal" style:font-size-complex="11pt" style:font-weight-complex="normal"/>
    </style:style>
    <style:style style:name="T12" style:family="text">
      <style:text-properties fo:font-variant="normal" fo:text-transform="none" fo:color="#000000" loext:opacity="100%" style:font-name="Arial" fo:font-size="11pt" fo:font-style="normal" style:text-underline-style="none" fo:font-weight="bold" officeooo:rsid="0019544f" fo:background-color="transparent" loext:char-shading-value="0" style:font-size-asian="11pt" style:font-weight-asian="bold" style:font-size-complex="11pt" style:font-weight-complex="bold"/>
    </style:style>
    <style:style style:name="T13" style:family="text">
      <style:text-properties fo:font-variant="normal" fo:text-transform="none" fo:color="#000000" loext:opacity="100%" style:font-name="Arial" fo:font-size="11pt" fo:font-style="normal" style:text-underline-style="none" fo:font-weight="bold" officeooo:rsid="001a92a1" fo:background-color="transparent" loext:char-shading-value="0" style:font-size-asian="11pt" style:font-weight-asian="bold" style:font-size-complex="11pt" style:font-weight-complex="bold"/>
    </style:style>
    <style:style style:name="T14" style:family="text">
      <style:text-properties fo:font-variant="normal" fo:text-transform="none" fo:color="#000000" loext:opacity="100%" style:font-name="Arial" fo:font-size="11pt" fo:font-style="normal" style:text-underline-style="none" fo:font-weight="bold" officeooo:rsid="001bde8a" fo:background-color="transparent" loext:char-shading-value="0" style:font-size-asian="11pt" style:font-weight-asian="bold" style:font-size-complex="11pt" style:font-weight-complex="bold"/>
    </style:style>
    <style:style style:name="T15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3"><text:bookmark text:name="docs-internal-guid-33188fdd-7fff-9302-dd1a-94a9908db8ff"/>Section 1: Basics – Database &amp; Collection Operations</text:h>
      <text:p text:style-name="P3"/>
      <text:h text:style-name="P1" text:outline-level="3"><text:bookmark text:name="docs-internal-guid-5d23b963-7fff-450d-16b7-695a9a76bab7"/>Part 1: Insert, Update, Delete, Bulk Insert</text:h>
      <text:p text:style-name="Standard"/>
      <text:list xml:id="list3075965558" text:style-name="L1">
        <text:list-item>
          <text:p text:style-name="P14">use companyDB </text:p>
        </text:list-item>
      </text:list>
      <text:p text:style-name="Standard"/>
      <text:list xml:id="list165540715938391" text:continue-numbering="true" text:style-name="L1">
        <text:list-item>
          <text:p text:style-name="P14">db.createCollection("employees")</text:p>
        </text:list-item>
      </text:list>
      <text:p text:style-name="Standard"/>
      <text:list xml:id="list165540675322229" text:continue-numbering="true" text:style-name="L1">
        <text:list-item>
          <text:p text:style-name="P14">db.employees.insertOne( {"empId": 101, "name": "Ravi", "department": "IT", "salary": 75000, "isActive": true })</text:p>
        </text:list-item>
      </text:list>
      <text:p text:style-name="Standard"/>
      <text:list xml:id="list165540440193492" text:continue-numbering="true" text:style-name="L1">
        <text:list-item>
          <text:p text:style-name="P15">db.employees.insertMany([ </text:p>
          <text:p text:style-name="P15">{"empId": 102, "name": "Reena", "department": "HR", "salary": 60000, "isActive": true }, {"empId": 103, "name": "Jeenu", "department": "IT", "salary": 55000, "isActive": false }, {"empId": 104, "name": "Sathi", "department": "Finance", "salary": 30000, "isActive": true }, {"empId": 105, "name": "Veena", "department": "Finance", "salary": 45000, "isActive": true }, {"empId": 106, "name": "Sonu", "department": "IT", "salary": 75000, <text:s/>"isActive": true } ])</text:p>
        </text:list-item>
      </text:list>
      <text:p text:style-name="Standard"/>
      <text:list xml:id="list403982256" text:style-name="L2">
        <text:list-item>
          <text:p text:style-name="P16">db.employees.updateMany({ department:"IT" }, {$mul: { salary: 1.10 } })</text:p>
        </text:list-item>
      </text:list>
      <text:p text:style-name="Standard"/>
      <text:list xml:id="list165540199751978" text:continue-numbering="true" text:style-name="L2">
        <text:list-item>
          <text:p text:style-name="P16">db.employees.deleteMany({ isActive: false})</text:p>
        </text:list-item>
      </text:list>
      <text:p text:style-name="Standard"/>
      <text:h text:style-name="P1" text:outline-level="3">Part 2: Exporting, Importing, Dumping, and Restore</text:h>
      <text:p text:style-name="Standard"/>
      <text:list xml:id="list165540898870425" text:continue-numbering="true" text:style-name="L2">
        <text:list-item>
          <text:p text:style-name="P16">mongoexport --db companyDB --collection employees --out ~/home/user/Students_Works_5/2026-05-20/employees.json</text:p>
        </text:list-item>
      </text:list>
      <text:p text:style-name="Standard"/>
      <text:list xml:id="list165541711206734" text:continue-numbering="true" text:style-name="L2">
        <text:list-item>
          <text:p text:style-name="P16">mongodump --db companyDB</text:p>
        </text:list-item>
      </text:list>
      <text:p text:style-name="Standard"><text:tab/>mongosh</text:p>
      <text:p text:style-name="Standard"><text:tab/>use companyDB</text:p>
      <text:p text:style-name="Standard"><text:tab/>db.dropDatabase()</text:p>
      <text:p text:style-name="Standard"><text:tab/>exit</text:p>
      <text:p text:style-name="Standard"><text:tab/>mongorestore dump/</text:p>
      <text:p text:style-name="Standard"/>
      <text:list xml:id="list119553633" text:style-name="L3">
        <text:list-item>
          <text:p text:style-name="P17">mongoimport --db companyDB --collection importedEmployees --type csv --headerline --file ~/Desktop/sample.csv</text:p>
        </text:list-item>
      </text:list>
      <text:p text:style-name="P5"/>
      <text:h text:style-name="P10" text:outline-level="3">Part 3: Indexing</text:h>
      <text:list xml:id="list165539993563334" text:continue-numbering="true" text:style-name="L3">
        <text:list-item>
          <text:p text:style-name="P17">db.employees.createIndex({ department: 1 })</text:p>
        </text:list-item>
      </text:list>
      <text:p text:style-name="Standard"><text:tab/>db.employees.createindex({department: 1, salary: 1})</text:p>
      <text:p text:style-name="Standard"><text:tab/>db.employees.getIndexes()</text:p>
      <text:p text:style-name="Standard"/>
      <text:p text:style-name="P18">Part 4: Sharding, Clustering, and Nodes </text:p>
      <text:p text:style-name="Standard"/>
      <text:list xml:id="list4051709966" text:style-name="L4">
        <text:list-item>
          <text:p text:style-name="P29">Sharding in MongoDB : <text:span text:style-name="T1">Method to distribute large amount of data accross multiple servers. Each server stores a portion of data, called a shard.It helps MongoDB to handle large databases and improves performance.</text:span></text:p>
        </text:list-item>
        <text:list-item>
          <text:p text:style-name="P29"><text:soft-page-break/>Replica Set : <text:span text:style-name="T1">A group of MongoDB servers that maintain the same data copies. It provides data redundancy and high availability</text:span></text:p>
        </text:list-item>
        <text:list-item>
          <text:p text:style-name="P29">Primary node and Secondary nodes : <text:span text:style-name="T1">A replica usually contains one Primary node and multiple Seconday nodes. If the primary fails, one secondary automatically becomes primary. It prevents data loss, and ensures better availability.</text:span></text:p>
          <text:p text:style-name="P30">Primary node recieves all write operations such as insert, update, delete.</text:p>
          <text:p text:style-name="P30">Secondary node copy data from the primary. They usually handle read operations and provide backup support.</text:p>
        </text:list-item>
      </text:list>
      <text:p text:style-name="P31"/>
      <text:p text:style-name="P2"><text:bookmark text:name="docs-internal-guid-4789c670-7fff-759d-dc54-dc49156266fb"/>Part 5: Object ID &amp; time stamp</text:p>
      <text:p text:style-name="P31"/>
      <text:p text:style-name="P31"/>
      <text:list xml:id="list4031371228" text:style-name="L5">
        <text:list-item>
          <text:p text:style-name="P32"><text:bookmark text:name="docs-internal-guid-2423a329-7fff-35ae-bb77-2a816b1e5888"/><text:span text:style-name="T2">ObjectId("</text:span><text:span text:style-name="T3">6a0d407b5667a4b63d9df8a3</text:span><text:span text:style-name="T2">").getTimestamp()</text:span></text:p>
        </text:list-item>
      </text:list>
      <text:p text:style-name="P31"/>
      <text:p text:style-name="P6"/>
      <text:p text:style-name="P19"><text:bookmark text:name="docs-internal-guid-1e8f46ca-7fff-f99a-f768-7521555139ec"/>Section 2: MongoDB Compass</text:p>
      <text:p text:style-name="P19"/>
      <text:h text:style-name="P13" text:outline-level="3"><text:bookmark text:name="docs-internal-guid-5d2bec09-7fff-c962-3afe-e1353a68971a"/>Part 2: Search and Filtering (Querying)</text:h>
      <text:list xml:id="list3469779376" text:style-name="L6">
        <text:list-header>
          <text:p text:style-name="P20"/>
        </text:list-header>
        <text:list-item>
          <text:p text:style-name="P21">{ department: "IT" }</text:p>
        </text:list-item>
        <text:list-item>
          <text:p text:style-name="P21">{ salary: { $gt: 50000 } }</text:p>
        </text:list-item>
        <text:list-item>
          <text:p text:style-name="P22">{ "_id": { "$gt": { "$oid": "61cf99800000000000000000"} } }</text:p>
        </text:list-item>
        <text:list-item>
          <text:p text:style-name="P33"><text:span text:style-name="T4">{isActive : true, department: {$in : ['HR','IT']}} <text:s/></text:span></text:p>
          <text:list>
            <text:list-header>
              <text:p text:style-name="P33"><text:span text:style-name="T6">OR</text:span></text:p>
            </text:list-header>
          </text:list>
          <text:p text:style-name="P23">{$and: [ {isActive: true}, { $or : [ {department: 'HR'}, {department: 'IT'}]}]}</text:p>
        </text:list-item>
      </text:list>
      <text:p text:style-name="P24"/>
      <text:p text:style-name="P24"/>
      <text:p text:style-name="P24"/>
      <text:h text:style-name="P11" text:outline-level="3"><text:bookmark text:name="docs-internal-guid-fc1fae6c-7fff-7014-b643-dfd6cd46bc3e"/>Part 3: CRUD Operations in Compass</text:h>
      <text:list xml:id="list3119386995" text:style-name="L7">
        <text:list-item>
          <text:p text:style-name="P25"><text:span text:style-name="T15">Filter</text:span> : {empid: 105} <text:s text:c="2"/></text:p>
          <text:p text:style-name="P34"><text:span text:style-name="T12">Query</text:span><text:span text:style-name="T8"> : </text:span><text:span text:style-name="T7">{ $set: { <text:s/></text:span><text:span text:style-name="T8">department : HR</text:span><text:span text:style-name="T7">}}</text:span></text:p>
        </text:list-item>
        <text:list-item>
          <text:p text:style-name="P25"><text:span text:style-name="T15">Filter</text:span> : {department: ‘Sales’} <text:s/></text:p>
          <text:p text:style-name="P25"><text:span text:style-name="T15">Query</text:span>: {$inc: {salary: 10000}}</text:p>
        </text:list-item>
      </text:list>
      <text:p text:style-name="P26"/>
      <text:p text:style-name="P26"/>
      <text:h text:style-name="P12" text:outline-level="3"><text:bookmark text:name="docs-internal-guid-8965d156-7fff-00a5-0900-f49740de1126"/>Part 4: Aggregation Pipeline Builder</text:h>
      <text:p text:style-name="P26"/>
      <text:list xml:id="list1269540908" text:style-name="L8">
        <text:list-item>
          <text:p text:style-name="P35"><text:span text:style-name="T12">S</text:span><text:span text:style-name="T13">tage</text:span><text:span text:style-name="T14">1</text:span><text:span text:style-name="T9">: $group <text:s text:c="2"/></text:span></text:p>
        </text:list-item>
      </text:list>
      <text:p text:style-name="P7"><text:span text:style-name="T9"><text:tab/></text:span><text:span text:style-name="T13">Query</text:span><text:span text:style-name="T9">: </text:span><text:span text:style-name="T8">{ _id: "$department", <text:s/>avgSalary: { $avg: "$salary" }, <text:s/>maxSal</text:span><text:span text:style-name="T11">a</text:span><text:span text:style-name="T8">ry: { $max: "$salary" }, <text:s/><text:tab/>minSalary: { $min: "$salary" } }</text:span></text:p>
      <text:p text:style-name="P27"/>
      <text:list xml:id="list1934232569" text:style-name="L9">
        <text:list-item>
          <text:p text:style-name="P28"><text:span text:style-name="T15">Stage1</text:span>: $match</text:p>
          <text:p text:style-name="P28"><text:span text:style-name="T15">Query</text:span>: {salary : {$gt: 50000}}</text:p>
          <text:p text:style-name="P28"><text:span text:style-name="T15">Stage2</text:span>: $sort</text:p>
          <text:p text:style-name="P28"><text:span text:style-name="T15">Query</text:span>: {salary: -1}</text:p>
          <text:p text:style-name="P28"/>
        </text:list-item>
        <text:list-item>
          <text:p text:style-name="P28"><text:span text:style-name="T15">Stage1</text:span>: $project</text:p>
          <text:p text:style-name="P36"><text:span text:style-name="T14">Query</text:span><text:span text:style-name="T10"> : <text:s/>{ name : 1, <text:s/>department: 1, salary: 1, annualSalary: {$multiply: ["$salary",12]} }</text:span><text:span text:style-name="T7"><text:line-break/></text:span></text:p>
        </text:list-item>
      </text:list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IT Rachana" svg:font-family="'RIT Rachana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RIT Rachana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RIT Rachan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RIT Rachana" style:font-family-complex="'RIT Rachana'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IT Rachana" style:font-family-complex="'RIT Rachana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RIT Rachana" style:font-family-complex="'RIT Rachana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IT Rachana" style:font-family-complex="'RIT Rachana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20T15:01:44.020830286</meta:creation-date>
    <meta:generator>LibreOffice/7.3.7.2$Linux_X86_64 LibreOffice_project/30$Build-2</meta:generator>
    <dc:date>2026-05-20T16:55:39.579791184</dc:date>
    <meta:editing-duration>PT11M56S</meta:editing-duration>
    <meta:editing-cycles>3</meta:editing-cycles>
    <meta:document-statistic meta:table-count="0" meta:image-count="0" meta:object-count="0" meta:page-count="2" meta:paragraph-count="54" meta:word-count="449" meta:character-count="3074" meta:non-whitespace-character-count="2691"/>
  </office:meta>
</office:document-meta>
</file>